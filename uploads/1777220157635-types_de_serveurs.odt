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e comprends votre demande, mais je dois vous informer d'une limitation importante : **je ne peux pas créer de fichiers téléchargeables** (Word, PDF, etc.) en dehors des graphiques générés par Python.</text:p>
      <text:p text:style-name="Standard"/>
      <text:p text:style-name="Standard">Cependant, je peux vous fournir l'**intégralité du contenu** dans ma réponse, formaté en markdown structuré que vous pourrez copier-coller dans Word. Le document sera complet, pédagogique et détaillé.</text:p>
      <text:p text:style-name="Standard"/>
      <text:p text:style-name="Standard">Voici votre guide complet sur les serveurs, les racks et l'infrastructure backend :</text:p>
      <text:p text:style-name="Standard"/>
      <text:p text:style-name="Standard">---</text:p>
      <text:p text:style-name="Standard"/>
      <text:p text:style-name="Standard"># **LE GUIDE COMPLET : SERVEURS, RACKS ET INFRASTRUCTURE BACKEND**</text:p>
      <text:p text:style-name="Standard">## *Comprendre l'informatique derrière les sites web et applications*</text:p>
      <text:p text:style-name="Standard"/>
      <text:p text:style-name="Standard">---</text:p>
      <text:p text:style-name="Standard"/>
      <text:p text:style-name="Standard"># **TABLE DES MATIÈRES**</text:p>
      <text:p text:style-name="Standard"/>
      <text:p text:style-name="Standard">1. Qu'est-ce qu'un serveur ?</text:p>
      <text:p text:style-name="Standard">2. La différence entre un PC et un serveur</text:p>
      <text:p text:style-name="Standard">3. Les types de serveurs</text:p>
      <text:p text:style-name="Standard">4. Les formes physiques des serveurs</text:p>
      <text:p text:style-name="Standard">5. Les racks (baies) : l'organisation physique</text:p>
      <text:p text:style-name="Standard">6. Le refroidissement des serveurs</text:p>
      <text:p text:style-name="Standard">7. L'alimentation électrique</text:p>
      <text:p text:style-name="Standard">8. Le stockage dans un serveur</text:p>
      <text:p text:style-name="Standard">9. La mémoire (RAM) serveur</text:p>
      <text:p text:style-name="Standard">10. Les processeurs serveur</text:p>
      <text:p text:style-name="Standard">11. La connectivité réseau</text:p>
      <text:p text:style-name="Standard">12. Les systèmes d'exploitation serveur</text:p>
      <text:p text:style-name="Standard">13. La virtualisation : faire plusieurs serveurs dans un seul</text:p>
      <text:p text:style-name="Standard">14. Le cloud vs le local (on-premise)</text:p>
      <text:p text:style-name="Standard">15. Les types d'installation et d'hébergement</text:p>
      <text:p text:style-name="Standard">16. La haute disponibilité et la redondance</text:p>
      <text:p text:style-name="Standard">17. La sécurité physique des serveurs</text:p>
      <text:p text:style-name="Standard">18. La maintenance et la surveillance</text:p>
      <text:p text:style-name="Standard">19. Le vocabulaire essentiel à connaître</text:p>
      <text:p text:style-name="Standard">20. Cas pratiques et exemples concrets</text:p>
      <text:p text:style-name="Standard"/>
      <text:p text:style-name="Standard">---</text:p>
      <text:p text:style-name="Standard"/>
      <text:p text:style-name="Standard"># **CHAPITRE 1 : QU'EST-CE QU'UN SERVEUR ?**</text:p>
      <text:p text:style-name="Standard"/>
      <text:p text:style-name="Standard">## **1.1 La définition simple**</text:p>
      <text:p text:style-name="Standard"/>
      <text:p text:style-name="Standard">Un **serveur** est un ordinateur qui attend des demandes et y répond. C'est tout.</text:p>
      <text:p text:style-name="Standard"/>
      <text:p text:style-name="Standard">Imagine un serveur comme un **serveur de restaurant** :</text:p>
      <text:p text:style-name="Standard">- Il attend à sa station (le serveur est allumé et écoute)</text:p>
      <text:p text:style-name="Standard">- Un client arrive et demande un plat (vous tapez www.google.com)</text:p>
      <text:p text:style-name="Standard">- Le serveur va chercher la commande en cuisine (il traite la demande)</text:p>
      <text:p text:style-name="Standard"><text:soft-page-break/>- Il rapporte le plat au client (il affiche la page web)</text:p>
      <text:p text:style-name="Standard"/>
      <text:p text:style-name="Standard">Dans la vraie vie informatique :</text:p>
      <text:p text:style-name="Standard">- Vous ouvrez votre navigateur et tapez `www.facebook.com`</text:p>
      <text:p text:style-name="Standard">- Votre ordinateur (le **client**) envoie une demande via Internet</text:p>
      <text:p text:style-name="Standard">- Un ordinateur quelque part dans le monde (le **serveur**) reçoit cette demande</text:p>
      <text:p text:style-name="Standard">- Le serveur prépare la page Facebook avec vos informations</text:p>
      <text:p text:style-name="Standard">- Il renvoie tout ça à votre écran</text:p>
      <text:p text:style-name="Standard"/>
      <text:p text:style-name="Standard">**Le serveur ne prend jamais l'initiative** : il attend passivement qu'on lui demande quelque chose. C'est pour ça qu'on l'appelle "serveur" — il sert les clients.</text:p>
      <text:p text:style-name="Standard"/>
      <text:p text:style-name="Standard">## **1.2 Le serveur est un ordinateur, mais pas n'importe lequel**</text:p>
      <text:p text:style-name="Standard"/>
      <text:p text:style-name="Standard">Un serveur a exactement les mêmes composants qu'un PC :</text:p>
      <text:p text:style-name="Standard">- Un processeur (CPU)</text:p>
      <text:p text:style-name="Standard">- De la mémoire vive (RAM)</text:p>
      <text:p text:style-name="Standard">- Des disques durs (stockage)</text:p>
      <text:p text:style-name="Standard">- Une carte réseau (connexion Internet)</text:p>
      <text:p text:style-name="Standard">- Une alimentation électrique</text:p>
      <text:p text:style-name="Standard"/>
      <text:p text:style-name="Standard">**Mais** chaque composant est conçu pour :</text:p>
      <text:p text:style-name="Standard">- Fonctionner **24 heures sur 24, 7 jours sur 7**</text:p>
      <text:p text:style-name="Standard">- Ne **jamais s'éteindre** (ou le moins possible)</text:p>
      <text:p text:style-name="Standard">- Être **réparable sans arrêter la machine**</text:p>
      <text:p text:style-name="Standard">- Gérer **des milliers de demandes simultanées**</text:p>
      <text:p text:style-name="Standard"/>
      <text:p text:style-name="Standard">## **1.3 Les différents rôles d'un serveur**</text:p>
      <text:p text:style-name="Standard"/>
      <text:p text:style-name="Standard">Un serveur peut jouer plusieurs rôles. Voici les principaux :</text:p>
      <text:p text:style-name="Standard"/>
      <text:p text:style-name="Standard">### **Serveur Web**</text:p>
      <text:p text:style-name="Standard">Son job : afficher des sites Internet.</text:p>
      <text:p text:style-name="Standard">- Quand vous allez sur un site, c'est un serveur web qui vous envoie les pages</text:p>
      <text:p text:style-name="Standard">- Exemples de logiciels : Apache, Nginx, Microsoft IIS</text:p>
      <text:p text:style-name="Standard">- Un gros site comme Amazon utilise des milliers de serveurs web</text:p>
      <text:p text:style-name="Standard"/>
      <text:p text:style-name="Standard">### **Serveur de Base de Données**</text:p>
      <text:p text:style-name="Standard">Son job : stocker et organiser des informations.</text:p>
      <text:p text:style-name="Standard">- Il garde les comptes utilisateurs, les commandes, les messages, etc.</text:p>
      <text:p text:style-name="Standard">- Exemples : MySQL, PostgreSQL, Oracle, Microsoft SQL Server</text:p>
      <text:p text:style-name="Standard">- C'est comme un archiviste ultra-rapide qui trouve une fiche en millisecondes</text:p>
      <text:p text:style-name="Standard"/>
      <text:p text:style-name="Standard">### **Serveur de Fichiers**</text:p>
      <text:p text:style-name="Standard">Son job : stocker des documents partagés.</text:p>
      <text:p text:style-name="Standard">- Dans une entreprise, tous les documents sont sur un serveur de fichiers</text:p>
      <text:p text:style-name="Standard">- Les employés y accèdent depuis leur PC</text:p>
      <text:p text:style-name="Standard">- Exemple : un serveur Windows avec des dossiers partagés</text:p>
      <text:p text:style-name="Standard"/>
      <text:p text:style-name="Standard">### **Serveur Mail**</text:p>
      <text:p text:style-name="Standard">Son job : envoyer et recevoir des emails.</text:p>
      <text:p text:style-name="Standard">- Quand vous envoyez un email, un serveur mail le prend et le route vers le destinataire</text:p>
      <text:p text:style-name="Standard"><text:soft-page-break/>- Exemples : Microsoft Exchange, Postfix</text:p>
      <text:p text:style-name="Standard"/>
      <text:p text:style-name="Standard">### **Serveur DNS**</text:p>
      <text:p text:style-name="Standard">Son job : traduire les noms en adresses.</text:p>
      <text:p text:style-name="Standard">- `www.google.com` → `142.250.185.68`</text:p>
      <text:p text:style-name="Standard">- C'est comme un annuaire téléphonique géant d'Internet</text:p>
      <text:p text:style-name="Standard"/>
      <text:p text:style-name="Standard">### **Serveur d'Application**</text:p>
      <text:p text:style-name="Standard">Son job : faire tourner des programmes métier.</text:p>
      <text:p text:style-name="Standard">- Par exemple, le logiciel de gestion des stocks de l'entreprise</text:p>
      <text:p text:style-name="Standard">- Il calcule, traite, et renvoie les résultats</text:p>
      <text:p text:style-name="Standard"/>
      <text:p text:style-name="Standard">---</text:p>
      <text:p text:style-name="Standard"/>
      <text:p text:style-name="Standard"># **CHAPITRE 2 : LA DIFFÉRENCE ENTRE UN PC ET UN SERVEUR**</text:p>
      <text:p text:style-name="Standard"/>
      <text:p text:style-name="Standard">## **2.1 Comparatif détaillé**</text:p>
      <text:p text:style-name="Standard"/>
      <text:p text:style-name="Standard">| Aspect | PC de Bureau | Serveur |</text:p>
      <text:p text:style-name="Standard">|--------|-------------|---------|</text:p>
      <text:p text:style-name="Standard">| **Usage** | Bureautique, jeux, navigation | Héberger des services 24/7 |</text:p>
      <text:p text:style-name="Standard">| **Durée de fonctionnement** | 8-12h/jour | 24h/24, 365j/an |</text:p>
      <text:p text:style-name="Standard">| **Forme** | Tour verticale ou boîtier plat | Boîtier plat rackable (19 pouces) |</text:p>
      <text:p text:style-name="Standard">| **Bruit** | Silencieux | Bruyant (ventilateurs puissants) |</text:p>
      <text:p text:style-name="Standard">| **Alimentation** | 1 bloc | 2 blocs redondants (hot-swap) |</text:p>
      <text:p text:style-name="Standard">| **Mémoire RAM** | 8-64 Go | 64 Go - 6 To |</text:p>
      <text:p text:style-name="Standard">| **Type de RAM** | Standard | ECC (correction d'erreurs) |</text:p>
      <text:p text:style-name="Standard">| **Processeur** | 1 CPU, 4-16 cœurs | 2-4 CPU, 32-128 cœurs |</text:p>
      <text:p text:style-name="Standard">| **Disques** | 1-2 SSD/HDD | 8-24 disques hot-swap |</text:p>
      <text:p text:style-name="Standard">| **Carte réseau** | 1 port 1 Gb/s | 2-4 ports 10-100 Gb/s |</text:p>
      <text:p text:style-name="Standard">| **Gestion à distance** | Limitée | Complète (même éteint) |</text:p>
      <text:p text:style-name="Standard">| **Prix** | 500-3000€ | 5000-50000€+ |</text:p>
      <text:p text:style-name="Standard">| **Garantie** | 2-3 ans | 3-5 ans, support 24/7 |</text:p>
      <text:p text:style-name="Standard"/>
      <text:p text:style-name="Standard">## **2.2 Pourquoi un serveur coûte cher ?**</text:p>
      <text:p text:style-name="Standard"/>
      <text:p text:style-name="Standard">### **La fiabilité**</text:p>
      <text:p text:style-name="Standard">Les composants serveur sont testés pour durer plus longtemps. Un disque dur de PC est testé pour 8h/jour. Un disque serveur est testé pour 24h/24.</text:p>
      <text:p text:style-name="Standard"/>
      <text:p text:style-name="Standard">### **La redondance**</text:p>
      <text:p text:style-name="Standard">Si une pièce tombe en panne, une autre prend le relais sans arrêt. Sur un PC, si l'alimentation grille, tout s'arrête. Sur un serveur, il y en a deux : si une tombe, l'autre continue.</text:p>
      <text:p text:style-name="Standard"/>
      <text:p text:style-name="Standard">### **La maintenance à chaud (Hot-Swap)**</text:p>
      <text:p text:style-name="Standard">Sur un serveur, vous pouvez changer un disque dur **sans éteindre la machine**. Sur un PC, vous devez tout éteindre, ouvrir le boîtier, débrancher, etc.</text:p>
      <text:p text:style-name="Standard"/>
      <text:p text:style-name="Standard">### **La gestion à distance (IPMI / iDRAC / iLO)**</text:p>
      <text:p text:style-name="Standard">Même si le serveur est complètement planté, vous pouvez l'allumer, l'éteindre, voir l'écran, changer des paramètres **depuis un autre ordinateur à l'autre bout du monde**. C'est comme avoir une télécommande universelle pour l'ordinateur.</text:p>
      <text:p text:style-name="Standard"><text:soft-page-break/></text:p>
      <text:p text:style-name="Standard">---</text:p>
      <text:p text:style-name="Standard"/>
      <text:p text:style-name="Standard"># **CHAPITRE 3 : LES TYPES DE SERVEURS**</text:p>
      <text:p text:style-name="Standard"/>
      <text:p text:style-name="Standard">## **3.1 Les serveurs physiques (Bare Metal)**</text:p>
      <text:p text:style-name="Standard"/>
      <text:p text:style-name="Standard">C'est un vrai ordinateur, avec une vraie carte mère, de vrais composants. Il existe plusieurs formes :</text:p>
      <text:p text:style-name="Standard"/>
      <text:p text:style-name="Standard">### **Serveur Tour (Tower Server)**</text:p>
      <text:p text:style-name="Standard">Ressemble à un PC de bureau, mais en plus gros et plus robuste.</text:p>
      <text:p text:style-name="Standard">- **Avantages** : Pas besoin de rack, silencieux (relativement), bon marché</text:p>
      <text:p text:style-name="Standard">- **Inconvénients** : Prend de la place, pas optimisé pour le refroidissement en masse</text:p>
      <text:p text:style-name="Standard">- **Usage** : Petites entreprises, bureaux distants, test et développement</text:p>
      <text:p text:style-name="Standard"/>
      <text:p text:style-name="Standard">### **Serveur Rack (Rack Server)**</text:p>
      <text:p text:style-name="Standard">C'est le plus courant dans les films et les datacenters. C'est un boîtier plat conçu pour s'empiler dans une baie métallique.</text:p>
      <text:p text:style-name="Standard">- **Avantages** : Densité maximale, refroidissement optimisé, maintenance facile</text:p>
      <text:p text:style-name="Standard">- **Inconvénients** : Nécessite une salle serveur, bruyant</text:p>
      <text:p text:style-name="Standard">- **Usage** : Datacenters, entreprises moyennes et grandes</text:p>
      <text:p text:style-name="Standard"/>
      <text:p text:style-name="Standard">### **Serveur Lame (Blade Server)**</text:p>
      <text:p text:style-name="Standard">Un châssis partagé contient plusieurs mini-serveurs (lames) qui glissent comme des tiroirs.</text:p>
      <text:p text:style-name="Standard">- **Avantages** : Densité extrême, câblage réduit, gestion centralisée</text:p>
      <text:p text:style-name="Standard">- **Inconvénients** : Dépendance au châssis, chauffe plus</text:p>
      <text:p text:style-name="Standard">- **Usage** : Grands datacenters, cloud computing</text:p>
      <text:p text:style-name="Standard"/>
      <text:p text:style-name="Standard">## **3.2 Les serveurs virtuels (Virtual Machines)**</text:p>
      <text:p text:style-name="Standard"/>
      <text:p text:style-name="Standard">C'est une astuce informatique : on fait tourner **plusieurs serveurs virtuels à l'intérieur d'un seul serveur physique**.</text:p>
      <text:p text:style-name="Standard"/>
      <text:p text:style-name="Standard">**Analogie** : Imaginez un grand immeuble (le serveur physique). On le divise en plusieurs appartements (les serveurs virtuels). Chaque appartement a sa propre cuisine, sa salle de bain, son salon — mais tout partage les murs et les canalisations de l'immeuble.</text:p>
      <text:p text:style-name="Standard"/>
      <text:p text:style-name="Standard">**Avantages** :</text:p>
      <text:p text:style-name="Standard">- Économie : 1 serveur physique = 10-50 serveurs virtuels</text:p>
      <text:p text:style-name="Standard">- Flexibilité : on crée ou supprime un serveur virtuel en 5 minutes</text:p>
      <text:p text:style-name="Standard">- Isolation : si un serveur virtuel plante, les autres continuent</text:p>
      <text:p text:style-name="Standard"/>
      <text:p text:style-name="Standard">**Logiciels de virtualisation** : VMware vSphere, Microsoft Hyper-V, Proxmox, KVM</text:p>
      <text:p text:style-name="Standard"/>
      <text:p text:style-name="Standard">## **3.3 Les serveurs conteneurisés (Containers)**</text:p>
      <text:p text:style-name="Standard"/>
      <text:p text:style-name="Standard">Encore plus léger que la virtualisation. Au lieu d'appartements complets, ce sont des **studios meublés** qui partagent tout sauf l'essentiel.</text:p>
      <text:p text:style-name="Standard"/>
      <text:p text:style-name="Standard">**Avantages** :</text:p>
      <text:p text:style-name="Standard">- Ultra-léger : on peut en faire tourner des centaines sur un seul serveur</text:p>
      <text:p text:style-name="Standard">- Démarrage en quelques secondes</text:p>
      <text:p text:style-name="Standard"><text:soft-page-break/>- Parfait pour les microservices (découper une application en petits morceaux)</text:p>
      <text:p text:style-name="Standard"/>
      <text:p text:style-name="Standard">**Logiciels** : Docker, Kubernetes</text:p>
      <text:p text:style-name="Standard"/>
      <text:p text:style-name="Standard">---</text:p>
      <text:p text:style-name="Standard"/>
      <text:p text:style-name="Standard"># **CHAPITRE 4 : LES FORMES PHYSIQUES DES SERVEURS**</text:p>
      <text:p text:style-name="Standard"/>
      <text:p text:style-name="Standard">## **4.1 Le standard 19 pouces**</text:p>
      <text:p text:style-name="Standard"/>
      <text:p text:style-name="Standard">Toute l'industrie des serveurs utilise un standard vieux de 60 ans : la **largeur de 19 pouces** (48,26 centimètres).</text:p>
      <text:p text:style-name="Standard"/>
      <text:p text:style-name="Standard">Pourquoi 19 pouces ? À l'origine, c'était pour les équipements téléphoniques dans les années 1930. Le standard a perduré parce qu'il fonctionne.</text:p>
      <text:p text:style-name="Standard"/>
      <text:p text:style-name="Standard">## **4.2 L'unité U (Unité Rack)**</text:p>
      <text:p text:style-name="Standard"/>
      <text:p text:style-name="Standard">La hauteur des serveurs est mesurée en **U** :</text:p>
      <text:p text:style-name="Standard">- **1U** = 4,445 centimètres (1,75 pouce)</text:p>
      <text:p text:style-name="Standard">- **2U** = 8,89 centimètres</text:p>
      <text:p text:style-name="Standard">- **4U** = 17,78 centimètres</text:p>
      <text:p text:style-name="Standard"/>
      <text:p text:style-name="Standard">**Un serveur 1U** est très plat. Il rentre dans un rack standard mais ne peut pas accueillir beaucoup de disques durs.</text:p>
      <text:p text:style-name="Standard"/>
      <text:p text:style-name="Standard">**Un serveur 2U** est deux fois plus haut. Il peut accueillir plus de disques, plus de cartes d'extension, et ventile mieux.</text:p>
      <text:p text:style-name="Standard"/>
      <text:p text:style-name="Standard">**Un serveur 4U** est pour les usages spéciaux : beaucoup de stockage, ou plusieurs cartes graphiques (GPU) pour l'intelligence artificielle.</text:p>
      <text:p text:style-name="Standard"/>
      <text:p text:style-name="Standard">## **4.3 À quoi ressemble un serveur rack ?**</text:p>
      <text:p text:style-name="Standard"/>
      <text:p text:style-name="Standard">### **Face avant (Front Panel)**</text:p>
      <text:p text:style-name="Standard">- Des **LEDs** : vert = tout va bien, orange = attention, rouge = problème</text:p>
      <text:p text:style-name="Standard">- Un **écran LCD** miniature : affiche l'adresse IP, les températures, les messages d'erreur</text:p>
      <text:p text:style-name="Standard">- Des **boutons** : power, reset, identification (fait clignoter les LEDs pour trouver le serveur dans une baie)</text:p>
      <text:p text:style-name="Standard">- Des **baies de disques** : des petits tiroirs avec des disques durs qu'on peut changer à chaud</text:p>
      <text:p text:style-name="Standard"/>
      <text:p text:style-name="Standard">### **Face arrière (Rear Panel)**</text:p>
      <text:p text:style-name="Standard">- **Alimentations** : 2 blocs redondants avec des ventilateurs intégrés</text:p>
      <text:p text:style-name="Standard">- **Cartes réseau** : 2 à 4 ports Ethernet (parfois fibre optique)</text:p>
      <text:p text:style-name="Standard">- **Ports de gestion** : IPMI/iDRAC/iLO (la télécommande à distance)</text:p>
      <text:p text:style-name="Standard">- **Ports USB** : pour brancher clavier/souris si besoin</text:p>
      <text:p text:style-name="Standard">- **Cartes d'extension** : GPU, cartes réseau supplémentaires, etc.</text:p>
      <text:p text:style-name="Standard"/>
      <text:p text:style-name="Standard">---</text:p>
      <text:p text:style-name="Standard"/>
      <text:p text:style-name="Standard"># **CHAPITRE 5 : LES RACKS (BAIES) — L'ORGANISATION PHYSIQUE**</text:p>
      <text:p text:style-name="Standard"/>
      <text:p text:style-name="Standard"><text:soft-page-break/>## **5.1 Qu'est-ce qu'un rack ?**</text:p>
      <text:p text:style-name="Standard"/>
      <text:p text:style-name="Standard">Un **rack** (ou baie) est un **armoire métallique** standardisée où on empile les serveurs.</text:p>
      <text:p text:style-name="Standard"/>
      <text:p text:style-name="Standard">**Dimensions standard** :</text:p>
      <text:p text:style-name="Standard">- **Largeur** : 19 pouces (48,26 cm) — c'est la largeur des serveurs</text:p>
      <text:p text:style-name="Standard">- **Profondeur** : 60 à 120 cm (selon les serveurs)</text:p>
      <text:p text:style-name="Standard">- **Hauteur** : Mesurée en U, généralement **42U** (1m85) ou **48U** (2m10)</text:p>
      <text:p text:style-name="Standard"/>
      <text:p text:style-name="Standard">## **5.2 Les composants d'un rack**</text:p>
      <text:p text:style-name="Standard"/>
      <text:p text:style-name="Standard">### **Les rails (Rails)**</text:p>
      <text:p text:style-name="Standard">Ce sont des glissières métalliques que vous fixez sur les côtés du rack. Le serveur glisse dessus comme un tiroir. Cela permet de le sortir pour maintenance sans le débrancher.</text:p>
      <text:p text:style-name="Standard"/>
      <text:p text:style-name="Standard">### **Les étagères (Shelves)**</text:p>
      <text:p text:style-name="Standard">Pour les équipements qui ne sont pas rackables (modem, petit NAS, etc.), on met des étagères fixes ou coulissantes.</text:p>
      <text:p text:style-name="Standard"/>
      <text:p text:style-name="Standard">### **Les panneaux vides (Blank Panels)**</text:p>
      <text:p text:style-name="Standard">Des plaques de plastique ou métal qu'on met dans les emplacements vides. **Très importants** : ils forcent l'air à passer par les serveurs et empêchent les tourbillons d'air chaud.</text:p>
      <text:p text:style-name="Standard"/>
      <text:p text:style-name="Standard">### **Les organiseurs de câbles (Cable Management)**</text:p>
      <text:p text:style-name="Standard">Des anneaux, des brosses, des goulot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8:00:18.652893043</meta:creation-date>
    <dc:date>2026-04-23T12:19:29.080641354</dc:date>
    <meta:editing-duration>P2DT18H8M54S</meta:editing-duration>
    <meta:editing-cycles>1</meta:editing-cycles>
    <meta:document-statistic meta:table-count="0" meta:image-count="0" meta:object-count="0" meta:page-count="6" meta:paragraph-count="188" meta:word-count="1842" meta:character-count="11199" meta:non-whitespace-character-count="9544"/>
    <meta:generator>LibreOffice/24.2.7.2$Linux_X86_64 LibreOffice_project/420$Build-2</meta:generator>
  </office:meta>
</office:document-meta>
</file>